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229D12B30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13f3c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char" svg:width="13.471cm" svg:height="14.63cm" draw:z-index="0"><draw:image xlink:href="Pictures/10000000000001FD00000229D12B3013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1"><text:a xlink:type="simple" xlink:href="https://smp14.simplex.im/a#0ThhG4sfE0_9NO1cAgisn-GPmG0Ce8-t4gEUVk9BcgQ" text:style-name="Internet_20_link" text:visited-style-name="Visited_20_Internet_20_Link">https://smp14.simplex.im/a#0ThhG4sfE0_9NO1cAgisn-GPmG0Ce8-t4gEUVk9BcgQ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2:35:01.688507526</meta:creation-date>
    <meta:print-date>2026-07-15T12:41:24.959718645</meta:print-date>
    <meta:printed-by>PDF files</meta:printed-by>
    <dc:date>2026-07-15T12:48:17.124169446</dc:date>
    <meta:editing-duration>PT1M2S</meta:editing-duration>
    <meta:editing-cycles>1</meta:editing-cycles>
    <meta:document-statistic meta:table-count="1" meta:image-count="1" meta:object-count="0" meta:page-count="1" meta:paragraph-count="1" meta:word-count="1" meta:character-count="70" meta:non-whitespace-character-count="70"/>
    <meta:generator>LibreOffice/26.2.4.2$Linux_X86_64 LibreOffice_project/620$Build-2</meta:generator>
  </office:meta>
</office:document-meta>
</file>